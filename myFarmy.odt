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0f6" officeooo:paragraph-rsid="000280f6"/>
    </style:style>
    <style:style style:name="P2" style:family="paragraph" style:parent-style-name="Standard">
      <style:text-properties officeooo:rsid="000280f6" officeooo:paragraph-rsid="0002e9c1"/>
    </style:style>
    <style:style style:name="P3" style:family="paragraph" style:parent-style-name="Standard" style:list-style-name="L1">
      <style:text-properties officeooo:rsid="000280f6" officeooo:paragraph-rsid="0002e9c1"/>
    </style:style>
    <style:style style:name="P4" style:family="paragraph" style:parent-style-name="Standard">
      <style:text-properties officeooo:rsid="000280f6" officeooo:paragraph-rsid="000280f6"/>
    </style:style>
    <style:style style:name="P5" style:family="paragraph" style:parent-style-name="Standard" style:list-style-name="L1">
      <style:text-properties officeooo:rsid="0002e9c1" officeooo:paragraph-rsid="0002e9c1"/>
    </style:style>
    <style:style style:name="P6" style:family="paragraph" style:parent-style-name="Standard">
      <style:text-properties officeooo:rsid="0002e9c1" officeooo:paragraph-rsid="0002e9c1"/>
    </style:style>
    <style:style style:name="P7" style:family="paragraph" style:parent-style-name="Standard">
      <style:text-properties officeooo:rsid="0004129c" officeooo:paragraph-rsid="0004129c"/>
    </style:style>
    <style:style style:name="T1" style:family="text">
      <style:text-properties officeooo:rsid="0002e9c1"/>
    </style:style>
    <style:style style:name="T2" style:family="text">
      <style:text-properties officeooo:rsid="000412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Overview</text:p>
      <text:p text:style-name="P1"/>
      <text:p text:style-name="P2"><text:span text:style-name="T1">O</text:span>n a broader view <text:span text:style-name="T1">this p</text:span>rojects aims in creating a Digital place for agriculture. </text:p>
      <text:p text:style-name="P2">The project phase 1 includes various <text:span text:style-name="T1">use cases</text:span> like </text:p>
      <text:list xml:id="list6883192998867783714" text:style-name="L1">
        <text:list-item>
          <text:p text:style-name="P3">‘Find a mate bull’</text:p>
        </text:list-item>
        <text:list-item>
          <text:p text:style-name="P3">‘Find Native breed cow milk near by’</text:p>
        </text:list-item>
        <text:list-item>
          <text:p text:style-name="P3">‘<text:span text:style-name="T1">M</text:span>arket place for cattle feeds, cattle equipments,milk products etc’</text:p>
        </text:list-item>
        <text:list-item>
          <text:p text:style-name="P3">‘Finding Veterinary doctor near by’ </text:p>
        </text:list-item>
        <text:list-item>
          <text:p text:style-name="P3">‘Cattle sell/buy’</text:p>
        </text:list-item>
        <text:list-item>
          <text:p text:style-name="P3">‘Cattle Medicines’</text:p>
        </text:list-item>
        <text:list-item>
          <text:p text:style-name="P3">‘<text:span text:style-name="T1">Open Source knowledge on cattle farming, integrated farming </text:span></text:p>
        </text:list-item>
        <text:list-item>
          <text:p text:style-name="P5">Success stories</text:p>
        </text:list-item>
        <text:list-item>
          <text:p text:style-name="P3">‘Expert videos on cattle growth, controlling diseases’ etc, </text:p>
        </text:list-item>
      </text:list>
      <text:p text:style-name="P1"/>
      <text:p text:style-name="P1">The Aim is to promote ‘<text:span text:style-name="T1">Natural Farming’ </text:span><text:s/>, ‘<text:span text:style-name="T1">Sustainable agriculture’ , Healthy products to human consumption </text:span>by providing a digital space where consumers and farmers benefit. </text:p>
      <text:p text:style-name="P1"/>
      <text:p text:style-name="P6"/>
      <text:p text:style-name="P6">Beta Launch – <text:s/><text:span text:style-name="T2">Bull and Cow - </text:span>Scope</text:p>
      <text:p text:style-name="P6"/>
      <text:p text:style-name="P6">- Finding a mate bull</text:p>
      <text:p text:style-name="P6"><text:s text:c="2"/>This feature enables users to find a matting bull near by or access to those who can provide service for free or for a cost. Geo location enabled features shows the availability of matting bulls nearby.</text:p>
      <text:p text:style-name="P7">Farmers can register their bull if they can provide service to others.</text:p>
      <text:p text:style-name="P7"/>
      <text:p text:style-name="P7">- Finding Native cow breed milk near by</text:p>
      <text:p text:style-name="P7"><text:s text:c="2"/>This features enables users</text:p>
      <text:p text:style-name="P7"><text:tab/>- Register in the system to sell native cow milk or/and milk products </text:p>
      <text:p text:style-name="P7"><text:tab/>- Search for near by native cow milk providers or the milk products</text:p>
      <text:p text:style-name="P7"/>
      <text:p text:style-name="P1"/>
      <text:p text:style-name="P1"><text:s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7:19:12.949259748</meta:creation-date>
    <dc:date>2018-06-22T15:18:41.562529625</dc:date>
    <meta:editing-duration>PT4M1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04" meta:character-count="1194" meta:non-whitespace-character-count="1002"/>
  </office:meta>
</office:document-meta>
</file>